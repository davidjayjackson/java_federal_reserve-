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FRED Dem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D Calc Add-In - d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FRED_API_KEY, launch LibreOffice, recalc with Ctrl+Shift+F9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pass the key per formula (last arg), e.g. =FRED_LATEST("UNRATE"; $B$1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ive result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FRED_DESCRIPTION</text:p>
          </table:table-cell>
          <table:table-cell table:formula="of:=COM.EXAMPLE.FRED.FREDIMPL.FREDDESCRIPTION(&quot;GDP&quot;)" office:value-type="string" office:string-value="Gross Domestic Product" calcext:value-type="string">
            <text:p>Gross Domestic Product</text:p>
          </table:table-cell>
          <table:table-cell table:style-name="ce1" office:value-type="string" calcext:value-type="string">
            <text:p>=FRED_DESCRIPTION("GDP")</text:p>
          </table:table-cell>
        </table:table-row>
        <table:table-row table:style-name="ro1">
          <table:table-cell office:value-type="string" calcext:value-type="string">
            <text:p>FRED_META units</text:p>
          </table:table-cell>
          <table:table-cell table:formula="of:=COM.EXAMPLE.FRED.FREDIMPL.FREDMETA(&quot;GDP&quot;;&quot;units&quot;)" office:value-type="string" office:string-value="Billions of Dollars" calcext:value-type="string">
            <text:p>Billions of Dollars</text:p>
          </table:table-cell>
          <table:table-cell table:style-name="ce1" office:value-type="string" calcext:value-type="string">
            <text:p>=FRED_META("GDP";"units")</text:p>
          </table:table-cell>
        </table:table-row>
        <table:table-row table:style-name="ro1">
          <table:table-cell office:value-type="string" calcext:value-type="string">
            <text:p>FRED_META frequency</text:p>
          </table:table-cell>
          <table:table-cell table:formula="of:=COM.EXAMPLE.FRED.FREDIMPL.FREDMETA(&quot;GDP&quot;;&quot;frequency&quot;)" office:value-type="string" office:string-value="Quarterly" calcext:value-type="string">
            <text:p>Quarterly</text:p>
          </table:table-cell>
          <table:table-cell table:style-name="ce1" office:value-type="string" calcext:value-type="string">
            <text:p>=FRED_META("GDP";"frequency")</text:p>
          </table:table-cell>
        </table:table-row>
        <table:table-row table:style-name="ro1">
          <table:table-cell office:value-type="string" calcext:value-type="string">
            <text:p>FRED_META seasonal_adjustment</text:p>
          </table:table-cell>
          <table:table-cell table:formula="of:=COM.EXAMPLE.FRED.FREDIMPL.FREDMETA(&quot;GDP&quot;;&quot;seasonal_adjustment&quot;)" office:value-type="string" office:string-value="Seasonally Adjusted Annual Rate" calcext:value-type="string">
            <text:p>Seasonally Adjusted Annual Rate</text:p>
          </table:table-cell>
          <table:table-cell table:style-name="ce1" office:value-type="string" calcext:value-type="string">
            <text:p>=FRED_META("GDP";"seasonal_adjustment")</text:p>
          </table:table-cell>
        </table:table-row>
        <table:table-row table:style-name="ro1">
          <table:table-cell office:value-type="string" calcext:value-type="string">
            <text:p>FRED_META last_updated</text:p>
          </table:table-cell>
          <table:table-cell table:formula="of:=COM.EXAMPLE.FRED.FREDIMPL.FREDMETA(&quot;GDP&quot;;&quot;last_updated&quot;)" office:value-type="string" office:string-value="2026-06-25 07:50:52-05" calcext:value-type="string">
            <text:p>2026-06-25 07:50:52-05</text:p>
          </table:table-cell>
          <table:table-cell table:style-name="ce1" office:value-type="string" calcext:value-type="string">
            <text:p>=FRED_META("GDP";"last_updated")</text:p>
          </table:table-cell>
        </table:table-row>
        <table:table-row table:style-name="ro1">
          <table:table-cell office:value-type="string" calcext:value-type="string">
            <text:p>FRED_LATEST</text:p>
          </table:table-cell>
          <table:table-cell table:formula="of:=COM.EXAMPLE.FRED.FREDIMPL.FREDLATEST(&quot;UNRATE&quot;)" office:value-type="float" office:value="4.2" calcext:value-type="float">
            <text:p>4.2</text:p>
          </table:table-cell>
          <table:table-cell table:style-name="ce1" office:value-type="string" calcext:value-type="string">
            <text:p>=FRED_LATEST("UNRATE"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D_SERIES (array formula with headers, GDP quarterly 2022-2023)</text:p>
          </table:table-cell>
          <table:table-cell table:number-columns-repeated="2"/>
        </table:table-row>
        <table:table-row table:style-name="ro1">
          <table:table-cell table:number-matrix-columns-spanned="2" table:number-matrix-rows-spanned="9" table:formula="of:=COM.EXAMPLE.FRED.FREDIMPL.FREDSERIES(&quot;GDP&quot;;&quot;2022-01-01&quot;;&quot;2023-12-31&quot;;&quot;&quot;;TRUE())" office:value-type="string" office:string-value="Date" calcext:value-type="string">
            <text:p>Date</text:p>
          </table:table-cell>
          <table:table-cell office:value-type="string" office:string-value="Value" calcext:value-type="string">
            <text:p>Value</text:p>
          </table:table-cell>
          <table:table-cell office:value-type="string" calcext:value-type="string">
            <text:p>{=FRED_SERIES("GDP";"2022-01-01";"2023-12-31";"";TRUE())} <text:s/>(select range, Ctrl+Shift+Enter)</text:p>
          </table:table-cell>
        </table:table-row>
        <table:table-row table:style-name="ro1">
          <table:table-cell office:value-type="string" office:string-value="2022-01-01" calcext:value-type="string">
            <text:p>2022-01-01</text:p>
          </table:table-cell>
          <table:table-cell office:value-type="float" office:value="25250.347" calcext:value-type="float">
            <text:p>25250.347</text:p>
          </table:table-cell>
          <table:table-cell/>
        </table:table-row>
        <table:table-row table:style-name="ro1">
          <table:table-cell office:value-type="string" office:string-value="2022-04-01" calcext:value-type="string">
            <text:p>2022-04-01</text:p>
          </table:table-cell>
          <table:table-cell office:value-type="float" office:value="25861.292" calcext:value-type="float">
            <text:p>25861.292</text:p>
          </table:table-cell>
          <table:table-cell/>
        </table:table-row>
        <table:table-row table:style-name="ro1">
          <table:table-cell office:value-type="string" office:string-value="2022-07-01" calcext:value-type="string">
            <text:p>2022-07-01</text:p>
          </table:table-cell>
          <table:table-cell office:value-type="float" office:value="26336.304" calcext:value-type="float">
            <text:p>26336.304</text:p>
          </table:table-cell>
          <table:table-cell/>
        </table:table-row>
        <table:table-row table:style-name="ro1">
          <table:table-cell office:value-type="string" office:string-value="2022-10-01" calcext:value-type="string">
            <text:p>2022-10-01</text:p>
          </table:table-cell>
          <table:table-cell office:value-type="float" office:value="26770.514" calcext:value-type="float">
            <text:p>26770.514</text:p>
          </table:table-cell>
          <table:table-cell/>
        </table:table-row>
        <table:table-row table:style-name="ro1">
          <table:table-cell office:value-type="string" office:string-value="2023-01-01" calcext:value-type="string">
            <text:p>2023-01-01</text:p>
          </table:table-cell>
          <table:table-cell office:value-type="float" office:value="27216.445" calcext:value-type="float">
            <text:p>27216.445</text:p>
          </table:table-cell>
          <table:table-cell/>
        </table:table-row>
        <table:table-row table:style-name="ro1">
          <table:table-cell office:value-type="string" office:string-value="2023-04-01" calcext:value-type="string">
            <text:p>2023-04-01</text:p>
          </table:table-cell>
          <table:table-cell office:value-type="float" office:value="27530.055" calcext:value-type="float">
            <text:p>27530.055</text:p>
          </table:table-cell>
          <table:table-cell/>
        </table:table-row>
        <table:table-row table:style-name="ro1">
          <table:table-cell office:value-type="string" office:string-value="2023-07-01" calcext:value-type="string">
            <text:p>2023-07-01</text:p>
          </table:table-cell>
          <table:table-cell office:value-type="float" office:value="28074.846" calcext:value-type="float">
            <text:p>28074.846</text:p>
          </table:table-cell>
          <table:table-cell/>
        </table:table-row>
        <table:table-row table:style-name="ro1">
          <table:table-cell office:value-type="string" office:string-value="2023-10-01" calcext:value-type="string">
            <text:p>2023-10-01</text:p>
          </table:table-cell>
          <table:table-cell office:value-type="float" office:value="28424.722" calcext:value-type="float">
            <text:p>28424.7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21:28:41.952330700</meta:creation-date>
    <dc:date>2026-07-05T21:28:45.721561800</dc:date>
    <meta:editing-duration>PT4S</meta:editing-duration>
    <meta:editing-cycles>1</meta:editing-cycles>
    <meta:document-statistic meta:table-count="1" meta:cell-count="44" meta:object-count="0"/>
    <meta:generator>LibreOffice/26.2.4.2$Windows_X86_64 LibreOffice_project/0229ac93fcf0d7cbc6376066c6f35021cef002dc</meta:generator>
  </office:meta>
</office:document-meta>
</file>