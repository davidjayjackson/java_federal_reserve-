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591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null-year="1950"/>
      <table:table table:name="FRED Demo" table:style-name="ta1">
        <table:table-column table:style-name="co1" table:number-columns-repeated="3" table:default-cell-style-name="Default"/>
        <table:table-row table:style-name="ro1">
          <table:table-cell office:value-type="string" calcext:value-type="string">
            <text:p>FRED Calc Add-In - demo</text:p>
          </table:table-cell>
          <table:table-cell table:number-columns-repeated="2"/>
        </table:table-row>
        <table:table-row table:style-name="ro1">
          <table:table-cell office:value-type="string" calcext:value-type="string">
            <text:p>Set FRED_API_KEY, launch LibreOffice, recalc with Ctrl+Shift+F9.</text:p>
          </table:table-cell>
          <table:table-cell table:number-columns-repeated="2"/>
        </table:table-row>
        <table:table-row table:style-name="ro1">
          <table:table-cell office:value-type="string" calcext:value-type="string">
            <text:p>Or pass the key per formula (last arg), e.g. =FRED_LATEST("UNRATE"; $B$1).</text:p>
          </table:table-cell>
          <table:table-cell table:number-columns-repeated="2"/>
        </table:table-row>
        <table:table-row table:style-name="ro1">
          <table:table-cell office:value-type="string" calcext:value-type="string">
            <text:p>Function</text:p>
          </table:table-cell>
          <table:table-cell office:value-type="string" calcext:value-type="string">
            <text:p>Live result</text:p>
          </table:table-cell>
          <table:table-cell office:value-type="string" calcext:value-type="string">
            <text:p>Formula</text:p>
          </table:table-cell>
        </table:table-row>
        <table:table-row table:style-name="ro1">
          <table:table-cell office:value-type="string" calcext:value-type="string">
            <text:p>FRED_DESCRIPTION</text:p>
          </table:table-cell>
          <table:table-cell table:formula="of:=COM.EXAMPLE.FRED.FREDIMPL.FREDDESCRIPTION(&quot;GDP&quot;)" office:value-type="string" office:string-value="Gross Domestic Product" calcext:value-type="string">
            <text:p>Gross Domestic Product</text:p>
          </table:table-cell>
          <table:table-cell table:style-name="ce1" office:value-type="string" calcext:value-type="string">
            <text:p>=FRED_DESCRIPTION("GDP")</text:p>
          </table:table-cell>
        </table:table-row>
        <table:table-row table:style-name="ro1">
          <table:table-cell office:value-type="string" calcext:value-type="string">
            <text:p>FRED_META units</text:p>
          </table:table-cell>
          <table:table-cell table:formula="of:=COM.EXAMPLE.FRED.FREDIMPL.FREDMETA(&quot;GDP&quot;;&quot;units&quot;)" office:value-type="string" office:string-value="Billions of Dollars" calcext:value-type="string">
            <text:p>Billions of Dollars</text:p>
          </table:table-cell>
          <table:table-cell table:style-name="ce1" office:value-type="string" calcext:value-type="string">
            <text:p>=FRED_META("GDP";"units")</text:p>
          </table:table-cell>
        </table:table-row>
        <table:table-row table:style-name="ro1">
          <table:table-cell office:value-type="string" calcext:value-type="string">
            <text:p>FRED_META frequency</text:p>
          </table:table-cell>
          <table:table-cell table:formula="of:=COM.EXAMPLE.FRED.FREDIMPL.FREDMETA(&quot;GDP&quot;;&quot;frequency&quot;)" office:value-type="string" office:string-value="Quarterly" calcext:value-type="string">
            <text:p>Quarterly</text:p>
          </table:table-cell>
          <table:table-cell table:style-name="ce1" office:value-type="string" calcext:value-type="string">
            <text:p>=FRED_META("GDP";"frequency")</text:p>
          </table:table-cell>
        </table:table-row>
        <table:table-row table:style-name="ro1">
          <table:table-cell office:value-type="string" calcext:value-type="string">
            <text:p>FRED_META seasonal_adjustment</text:p>
          </table:table-cell>
          <table:table-cell table:formula="of:=COM.EXAMPLE.FRED.FREDIMPL.FREDMETA(&quot;GDP&quot;;&quot;seasonal_adjustment&quot;)" office:value-type="string" office:string-value="Seasonally Adjusted Annual Rate" calcext:value-type="string">
            <text:p>Seasonally Adjusted Annual Rate</text:p>
          </table:table-cell>
          <table:table-cell table:style-name="ce1" office:value-type="string" calcext:value-type="string">
            <text:p>=FRED_META("GDP";"seasonal_adjustment")</text:p>
          </table:table-cell>
        </table:table-row>
        <table:table-row table:style-name="ro1">
          <table:table-cell office:value-type="string" calcext:value-type="string">
            <text:p>FRED_META last_updated</text:p>
          </table:table-cell>
          <table:table-cell table:formula="of:=COM.EXAMPLE.FRED.FREDIMPL.FREDMETA(&quot;GDP&quot;;&quot;last_updated&quot;)" office:value-type="string" office:string-value="2026-06-25 07:50:52-05" calcext:value-type="string">
            <text:p>2026-06-25 07:50:52-05</text:p>
          </table:table-cell>
          <table:table-cell table:style-name="ce1" office:value-type="string" calcext:value-type="string">
            <text:p>=FRED_META("GDP";"last_updated")</text:p>
          </table:table-cell>
        </table:table-row>
        <table:table-row table:style-name="ro1">
          <table:table-cell office:value-type="string" calcext:value-type="string">
            <text:p>FRED_LATEST</text:p>
          </table:table-cell>
          <table:table-cell table:formula="of:=COM.EXAMPLE.FRED.FREDIMPL.FREDLATEST(&quot;UNRATE&quot;)" office:value-type="float" office:value="4.2" calcext:value-type="float">
            <text:p>4.2</text:p>
          </table:table-cell>
          <table:table-cell table:style-name="ce1" office:value-type="string" calcext:value-type="string">
            <text:p>=FRED_LATEST("UNRATE")</text:p>
          </table:table-cell>
        </table:table-row>
        <table:table-row table:style-name="ro1">
          <table:table-cell table:number-columns-repeated="3"/>
        </table:table-row>
        <table:table-row table:style-name="ro1">
          <table:table-cell office:value-type="string" calcext:value-type="string">
            <text:p>FRED_SERIES (array formula with headers, GDP quarterly 2022-2023)</text:p>
          </table:table-cell>
          <table:table-cell table:number-columns-repeated="2"/>
        </table:table-row>
        <table:table-row table:style-name="ro1">
          <table:table-cell table:number-matrix-columns-spanned="2" table:number-matrix-rows-spanned="9" table:formula="of:=COM.EXAMPLE.FRED.FREDIMPL.FREDSERIES(&quot;GDP&quot;;&quot;2022-01-01&quot;;&quot;2023-12-31&quot;;&quot;&quot;;TRUE())" office:value-type="string" office:string-value="Date" calcext:value-type="string">
            <text:p>Date</text:p>
          </table:table-cell>
          <table:table-cell office:value-type="string" office:string-value="Value" calcext:value-type="string">
            <text:p>Value</text:p>
          </table:table-cell>
          <table:table-cell office:value-type="string" calcext:value-type="string">
            <text:p>{=FRED_SERIES("GDP";"2022-01-01";"2023-12-31";"";TRUE())} <text:s/>(select range, Ctrl+Shift+Enter)</text:p>
          </table:table-cell>
        </table:table-row>
        <table:table-row table:style-name="ro1">
          <table:table-cell office:value-type="string" office:string-value="2022-01-01" calcext:value-type="string">
            <text:p>2022-01-01</text:p>
          </table:table-cell>
          <table:table-cell office:value-type="float" office:value="25250.347" calcext:value-type="float">
            <text:p>25250.347</text:p>
          </table:table-cell>
          <table:table-cell/>
        </table:table-row>
        <table:table-row table:style-name="ro1">
          <table:table-cell office:value-type="string" office:string-value="2022-04-01" calcext:value-type="string">
            <text:p>2022-04-01</text:p>
          </table:table-cell>
          <table:table-cell office:value-type="float" office:value="25861.292" calcext:value-type="float">
            <text:p>25861.292</text:p>
          </table:table-cell>
          <table:table-cell/>
        </table:table-row>
        <table:table-row table:style-name="ro1">
          <table:table-cell office:value-type="string" office:string-value="2022-07-01" calcext:value-type="string">
            <text:p>2022-07-01</text:p>
          </table:table-cell>
          <table:table-cell office:value-type="float" office:value="26336.304" calcext:value-type="float">
            <text:p>26336.304</text:p>
          </table:table-cell>
          <table:table-cell/>
        </table:table-row>
        <table:table-row table:style-name="ro1">
          <table:table-cell office:value-type="string" office:string-value="2022-10-01" calcext:value-type="string">
            <text:p>2022-10-01</text:p>
          </table:table-cell>
          <table:table-cell office:value-type="float" office:value="26770.514" calcext:value-type="float">
            <text:p>26770.514</text:p>
          </table:table-cell>
          <table:table-cell/>
        </table:table-row>
        <table:table-row table:style-name="ro1">
          <table:table-cell office:value-type="string" office:string-value="2023-01-01" calcext:value-type="string">
            <text:p>2023-01-01</text:p>
          </table:table-cell>
          <table:table-cell office:value-type="float" office:value="27216.445" calcext:value-type="float">
            <text:p>27216.445</text:p>
          </table:table-cell>
          <table:table-cell/>
        </table:table-row>
        <table:table-row table:style-name="ro1">
          <table:table-cell office:value-type="string" office:string-value="2023-04-01" calcext:value-type="string">
            <text:p>2023-04-01</text:p>
          </table:table-cell>
          <table:table-cell office:value-type="float" office:value="27530.055" calcext:value-type="float">
            <text:p>27530.055</text:p>
          </table:table-cell>
          <table:table-cell/>
        </table:table-row>
        <table:table-row table:style-name="ro1">
          <table:table-cell office:value-type="string" office:string-value="2023-07-01" calcext:value-type="string">
            <text:p>2023-07-01</text:p>
          </table:table-cell>
          <table:table-cell office:value-type="float" office:value="28074.846" calcext:value-type="float">
            <text:p>28074.846</text:p>
          </table:table-cell>
          <table:table-cell/>
        </table:table-row>
        <table:table-row table:style-name="ro1">
          <table:table-cell office:value-type="string" office:string-value="2023-10-01" calcext:value-type="string">
            <text:p>2023-10-01</text:p>
          </table:table-cell>
          <table:table-cell office:value-type="float" office:value="28424.722" calcext:value-type="float">
            <text:p>28424.722</text:p>
          </table:table-cell>
          <table:table-cell/>
        </table:table-row>
        <table:table-row table:style-name="ro1">
          <table:table-cell table:number-columns-repeated="3"/>
        </table:table-row>
        <table:table-row table:style-name="ro1">
          <table:table-cell office:value-type="string" calcext:value-type="string">
            <text:p>FRED_FIELDS (array formula with headers, GDP metadata fields)</text:p>
          </table:table-cell>
          <table:table-cell table:number-columns-repeated="2"/>
        </table:table-row>
        <table:table-row table:style-name="ro1">
          <table:table-cell table:number-matrix-columns-spanned="2" table:number-matrix-rows-spanned="16" table:formula="of:=COM.EXAMPLE.FRED.FREDIMPL.FREDFIELDS(&quot;GDP&quot;;&quot;&quot;;TRUE())" office:value-type="string" office:string-value="Field" calcext:value-type="string">
            <text:p>Field</text:p>
          </table:table-cell>
          <table:table-cell office:value-type="string" office:string-value="Value" calcext:value-type="string">
            <text:p>Value</text:p>
          </table:table-cell>
          <table:table-cell office:value-type="string" calcext:value-type="string">
            <text:p>{=FRED_FIELDS("GDP";"";TRUE())} <text:s/>(select range, Ctrl+Shift+Enter)</text:p>
          </table:table-cell>
        </table:table-row>
        <table:table-row table:style-name="ro1">
          <table:table-cell office:value-type="string" office:string-value="id" calcext:value-type="string">
            <text:p>id</text:p>
          </table:table-cell>
          <table:table-cell office:value-type="string" office:string-value="GDP" calcext:value-type="string">
            <text:p>GDP</text:p>
          </table:table-cell>
          <table:table-cell/>
        </table:table-row>
        <table:table-row table:style-name="ro1">
          <table:table-cell office:value-type="string" office:string-value="realtime_start" calcext:value-type="string">
            <text:p>realtime_start</text:p>
          </table:table-cell>
          <table:table-cell office:value-type="string" office:string-value="2026-06-25" calcext:value-type="string">
            <text:p>2026-06-25</text:p>
          </table:table-cell>
          <table:table-cell/>
        </table:table-row>
        <table:table-row table:style-name="ro1">
          <table:table-cell office:value-type="string" office:string-value="realtime_end" calcext:value-type="string">
            <text:p>realtime_end</text:p>
          </table:table-cell>
          <table:table-cell office:value-type="string" office:string-value="2026-06-25" calcext:value-type="string">
            <text:p>2026-06-25</text:p>
          </table:table-cell>
          <table:table-cell/>
        </table:table-row>
        <table:table-row table:style-name="ro1">
          <table:table-cell office:value-type="string" office:string-value="title" calcext:value-type="string">
            <text:p>title</text:p>
          </table:table-cell>
          <table:table-cell office:value-type="string" office:string-value="Gross Domestic Product" calcext:value-type="string">
            <text:p>Gross Domestic Product</text:p>
          </table:table-cell>
          <table:table-cell/>
        </table:table-row>
        <table:table-row table:style-name="ro1">
          <table:table-cell office:value-type="string" office:string-value="observation_start" calcext:value-type="string">
            <text:p>observation_start</text:p>
          </table:table-cell>
          <table:table-cell office:value-type="string" office:string-value="1947-01-01" calcext:value-type="string">
            <text:p>1947-01-01</text:p>
          </table:table-cell>
          <table:table-cell/>
        </table:table-row>
        <table:table-row table:style-name="ro1">
          <table:table-cell office:value-type="string" office:string-value="observation_end" calcext:value-type="string">
            <text:p>observation_end</text:p>
          </table:table-cell>
          <table:table-cell office:value-type="string" office:string-value="2026-01-01" calcext:value-type="string">
            <text:p>2026-01-01</text:p>
          </table:table-cell>
          <table:table-cell/>
        </table:table-row>
        <table:table-row table:style-name="ro1">
          <table:table-cell office:value-type="string" office:string-value="frequency" calcext:value-type="string">
            <text:p>frequency</text:p>
          </table:table-cell>
          <table:table-cell office:value-type="string" office:string-value="Quarterly" calcext:value-type="string">
            <text:p>Quarterly</text:p>
          </table:table-cell>
          <table:table-cell/>
        </table:table-row>
        <table:table-row table:style-name="ro1">
          <table:table-cell office:value-type="string" office:string-value="frequency_short" calcext:value-type="string">
            <text:p>frequency_short</text:p>
          </table:table-cell>
          <table:table-cell office:value-type="string" office:string-value="Q" calcext:value-type="string">
            <text:p>Q</text:p>
          </table:table-cell>
          <table:table-cell/>
        </table:table-row>
        <table:table-row table:style-name="ro1">
          <table:table-cell office:value-type="string" office:string-value="units" calcext:value-type="string">
            <text:p>units</text:p>
          </table:table-cell>
          <table:table-cell office:value-type="string" office:string-value="Billions of Dollars" calcext:value-type="string">
            <text:p>Billions of Dollars</text:p>
          </table:table-cell>
          <table:table-cell/>
        </table:table-row>
        <table:table-row table:style-name="ro1">
          <table:table-cell office:value-type="string" office:string-value="units_short" calcext:value-type="string">
            <text:p>units_short</text:p>
          </table:table-cell>
          <table:table-cell office:value-type="string" office:string-value="Bil. of $" calcext:value-type="string">
            <text:p>Bil. of $</text:p>
          </table:table-cell>
          <table:table-cell/>
        </table:table-row>
        <table:table-row table:style-name="ro1">
          <table:table-cell office:value-type="string" office:string-value="seasonal_adjustment" calcext:value-type="string">
            <text:p>seasonal_adjustment</text:p>
          </table:table-cell>
          <table:table-cell office:value-type="string" office:string-value="Seasonally Adjusted Annual Rate" calcext:value-type="string">
            <text:p>Seasonally Adjusted Annual Rate</text:p>
          </table:table-cell>
          <table:table-cell/>
        </table:table-row>
        <table:table-row table:style-name="ro1">
          <table:table-cell office:value-type="string" office:string-value="seasonal_adjustment_short" calcext:value-type="string">
            <text:p>seasonal_adjustment_short</text:p>
          </table:table-cell>
          <table:table-cell office:value-type="string" office:string-value="SAAR" calcext:value-type="string">
            <text:p>SAAR</text:p>
          </table:table-cell>
          <table:table-cell/>
        </table:table-row>
        <table:table-row table:style-name="ro1">
          <table:table-cell office:value-type="string" office:string-value="last_updated" calcext:value-type="string">
            <text:p>last_updated</text:p>
          </table:table-cell>
          <table:table-cell office:value-type="string" office:string-value="2026-06-25 07:50:52-05" calcext:value-type="string">
            <text:p>2026-06-25 07:50:52-05</text:p>
          </table:table-cell>
          <table:table-cell/>
        </table:table-row>
        <table:table-row table:style-name="ro1">
          <table:table-cell office:value-type="string" office:string-value="popularity" calcext:value-type="string">
            <text:p>popularity</text:p>
          </table:table-cell>
          <table:table-cell office:value-type="string" office:string-value="92.0" calcext:value-type="string">
            <text:p>92.0</text:p>
          </table:table-cell>
          <table:table-cell/>
        </table:table-row>
        <table:table-row table:style-name="ro1">
          <table:table-cell office:value-type="string" office:string-value="notes" calcext:value-type="string">
            <text:p>notes</text:p>
          </table:table-cell>
          <table:table-cell office:value-type="string" office:string-value="BEA Account Code: A191RC&#10;&#10;Gross domestic product (GDP), the featured measure of U.S. output, is the market value of the goods and services produced by labor and property located in the United States.For more information, see the Guide to the National Income and Product Accounts of the United States (NIPA) and the Bureau of Economic Analysis (http://www.bea.gov/national/pdf/nipaguid.pdf)." calcext:value-type="string">
            <text:p>BEA Account Code: A191RC</text:p>
            <text:p/>
            <text:p>Gross domestic product (GDP), the featured measure of U.S. output, is the market value of the goods and services produced by labor and property located in the United States.For more information, see the Guide to the National Income and Product Accounts of the United States (NIPA) and the Bureau of Economic Analysis (http://www.bea.gov/national/pdf/nipaguid.pdf).</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5T22:54:02.105957000</meta:creation-date>
    <dc:date>2026-07-05T22:54:07.436341900</dc:date>
    <meta:editing-duration>PT5S</meta:editing-duration>
    <meta:editing-cycles>1</meta:editing-cycles>
    <meta:document-statistic meta:table-count="1" meta:cell-count="78" meta:object-count="0"/>
    <meta:generator>LibreOffice/26.2.4.2$Windows_X86_64 LibreOffice_project/0229ac93fcf0d7cbc6376066c6f35021cef002dc</meta:generator>
  </office:meta>
</office:document-meta>
</file>